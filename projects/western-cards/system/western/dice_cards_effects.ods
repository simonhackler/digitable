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1.8228in"/>
    </style:style>
    <style:style style:name="co4" style:family="table-column">
      <style:table-column-properties fo:break-before="auto" style:column-width="1.7047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2.3591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ce_cards_effe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pies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dice_image</text:p>
          </table:table-cell>
          <table:table-cell office:value-type="string" calcext:value-type="string">
            <text:p>dice_value</text:p>
          </table:table-cell>
          <table:table-cell office:value-type="string" calcext:value-type="string">
            <text:p>effect_zone</text:p>
          </table:table-cell>
          <table:table-cell office:value-type="string" calcext:value-type="string">
            <text:p>back_backgrou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2]&amp;&quot;.png&quot;" office:value-type="string" office:string-value="dice_1.png" calcext:value-type="string">
            <text:p>dice_1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3]&amp;&quot;.png&quot;" office:value-type="string" office:string-value="dice_2.png" calcext:value-type="string">
            <text:p>dice_2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4]&amp;&quot;.png&quot;" office:value-type="string" office:string-value="dice_3.png" calcext:value-type="string">
            <text:p>dice_3.p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5]&amp;&quot;.png&quot;" office:value-type="string" office:string-value="dice_4.png" calcext:value-type="string">
            <text:p>dice_4.p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6]&amp;&quot;.png&quot;" office:value-type="string" office:string-value="dice_5.png" calcext:value-type="string">
            <text:p>dice_5.p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7]&amp;&quot;.png&quot;" office:value-type="string" office:string-value="dice_6.png" calcext:value-type="string">
            <text:p>dice_6.p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8]&amp;&quot;.png&quot;" office:value-type="string" office:string-value="dice_1.png" calcext:value-type="string">
            <text:p>dice_1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9]&amp;&quot;.png&quot;" office:value-type="string" office:string-value="dice_2.png" calcext:value-type="string">
            <text:p>dice_2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10]&amp;&quot;.png&quot;" office:value-type="string" office:string-value="dice_3.png" calcext:value-type="string">
            <text:p>dice_3.p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11]&amp;&quot;.png&quot;" office:value-type="string" office:string-value="dice_4.png" calcext:value-type="string">
            <text:p>dice_4.p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12]&amp;&quot;.png&quot;" office:value-type="string" office:string-value="dice_5.png" calcext:value-type="string">
            <text:p>dice_5.p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13]&amp;&quot;.png&quot;" office:value-type="string" office:string-value="dice_6.png" calcext:value-type="string">
            <text:p>dice_6.p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14]&amp;&quot;.png&quot;" office:value-type="string" office:string-value="dice_1.png" calcext:value-type="string">
            <text:p>dice_1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15]&amp;&quot;.png&quot;" office:value-type="string" office:string-value="dice_2.png" calcext:value-type="string">
            <text:p>dice_2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16]&amp;&quot;.png&quot;" office:value-type="string" office:string-value="dice_3.png" calcext:value-type="string">
            <text:p>dice_3.p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17]&amp;&quot;.png&quot;" office:value-type="string" office:string-value="dice_4.png" calcext:value-type="string">
            <text:p>dice_4.p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18]&amp;&quot;.png&quot;" office:value-type="string" office:string-value="dice_5.png" calcext:value-type="string">
            <text:p>dice_5.p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19]&amp;&quot;.png&quot;" office:value-type="string" office:string-value="dice_6.png" calcext:value-type="string">
            <text:p>dice_6.p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20]&amp;&quot;.png&quot;" office:value-type="string" office:string-value="dice_bomb.png" calcext:value-type="string">
            <text:p>dice_bomb.png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21]&amp;&quot;.png&quot;" office:value-type="string" office:string-value="dice_1.png" calcext:value-type="string">
            <text:p>dice_1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22]&amp;&quot;.png&quot;" office:value-type="string" office:string-value="dice_2.png" calcext:value-type="string">
            <text:p>dice_2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23]&amp;&quot;.png&quot;" office:value-type="string" office:string-value="dice_3.png" calcext:value-type="string">
            <text:p>dice_3.p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24]&amp;&quot;.png&quot;" office:value-type="string" office:string-value="dice_4.png" calcext:value-type="string">
            <text:p>dice_4.p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25]&amp;&quot;.png&quot;" office:value-type="string" office:string-value="dice_5.png" calcext:value-type="string">
            <text:p>dice_5.p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card_back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late_blank.png</text:p>
          </table:table-cell>
          <table:table-cell table:formula="of:=&quot;dice_&quot;&amp;[.E26]&amp;&quot;.png&quot;" office:value-type="string" office:string-value="dice_6.png" calcext:value-type="string">
            <text:p>dice_6.p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card_back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HarmonyOS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armonyOS Sans SC" style:font-family-asian="'HarmonyOS Sans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02T15:27:24.233845595</dc:date>
    <meta:editing-duration>PT4M34S</meta:editing-duration>
    <meta:editing-cycles>2</meta:editing-cycles>
    <meta:generator>LibreOffice/25.2.2.2$Linux_X86_64 LibreOffice_project/520$Build-2</meta:generator>
    <meta:document-statistic meta:table-count="1" meta:cell-count="157" meta:object-count="0"/>
  </office:meta>
</office:document-meta>
</file>